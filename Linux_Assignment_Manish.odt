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09C9D9B664A520E7AED.png" manifest:media-type="image/png"/>
  <manifest:file-entry manifest:full-path="Pictures/10000001000003D80000009C21FE7F1EDC4D3E1B.png" manifest:media-type="image/png"/>
  <manifest:file-entry manifest:full-path="Pictures/10000001000002B1000000AE6918DD29A047FE8E.png" manifest:media-type="image/png"/>
  <manifest:file-entry manifest:full-path="Pictures/100000010000038A000002AE212063DDA222BF8E.png" manifest:media-type="image/png"/>
  <manifest:file-entry manifest:full-path="Pictures/10000001000003580000007820E88667F88DFA59.png" manifest:media-type="image/png"/>
  <manifest:file-entry manifest:full-path="Pictures/100000010000037C000000F228D3CB00CAE5081C.png" manifest:media-type="image/png"/>
  <manifest:file-entry manifest:full-path="Pictures/1000000100000342000001168EBA087FE91317B4.png" manifest:media-type="image/png"/>
  <manifest:file-entry manifest:full-path="Pictures/100000010000038100000290BB65005C4F24CF07.png" manifest:media-type="image/png"/>
  <manifest:file-entry manifest:full-path="Pictures/1000000100000350000000FA3402D6EB7C0860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Assignment 1 - Manish Malviya</text:p>
      <text:h text:style-name="Heading_20_1" text:outline-level="1">1. Creating and Renaming Files/Directories</text:h>
      <text:p text:style-name="Standard">Commands:<text:line-break/>mkdir test_dir<text:line-break/>cd test_dir<text:line-break/>touch example.txt<text:line-break/>mv example.txt renamed_example.txt<text:line-break/><text:line-break/>Explanation:<text:line-break/>Creates directory, file, and renames it using mv.</text:p>
      <text:p text:style-name="Standard"><draw:frame draw:style-name="fr1" draw:name="Image1" text:anchor-type="char" svg:width="17cm" svg:height="5.011cm" draw:z-index="0"><draw:image xlink:href="Pictures/1000000100000350000000FA3402D6EB7C086048.png" xlink:type="simple" xlink:show="embed" xlink:actuate="onLoad" draw:mime-type="image/png"/></draw:frame></text:p>
      <text:h text:style-name="Heading_20_1" text:outline-level="1">2. Viewing File Contents</text:h>
      <text:p text:style-name="Standard">Commands:<text:line-break/>cat /etc/passwd<text:line-break/>head -n 5 /etc/passwd<text:line-break/>tail -n 5 /etc/passwd<text:line-break/><text:line-break/>Explanation:<text:line-break/>Displays full, first 5 lines, and last 5 lines of file.</text:p>
      <text:p text:style-name="Standard"/>
      <text:p text:style-name="Standard"><draw:frame draw:style-name="fr2" draw:name="Image2" text:anchor-type="char" svg:width="17cm" svg:height="12.432cm" draw:z-index="1"><draw:image xlink:href="Pictures/100000010000038100000290BB65005C4F24CF07.png" xlink:type="simple" xlink:show="embed" xlink:actuate="onLoad" draw:mime-type="image/png"/></draw:frame><text:soft-page-break/></text:p>
      <text:p text:style-name="Standard"/>
      <text:p text:style-name="Standard"><draw:frame draw:style-name="fr1" draw:name="Image3" text:anchor-type="char" svg:width="17cm" svg:height="5.666cm" draw:z-index="2"><draw:image xlink:href="Pictures/1000000100000342000001168EBA087FE91317B4.png" xlink:type="simple" xlink:show="embed" xlink:actuate="onLoad" draw:mime-type="image/png"/></draw:frame></text:p>
      <text:h text:style-name="Heading_20_1" text:outline-level="1"><text:soft-page-break/>3. Searching for Patterns</text:h>
      <text:p text:style-name="Standard">Command:<text:line-break/>grep "root" /etc/passwd<text:line-break/><text:line-break/>Explanation:<text:line-break/>Searches lines containing 'root'.</text:p>
      <text:p text:style-name="Standard"/>
      <text:p text:style-name="Standard"><draw:frame draw:style-name="fr2" draw:name="Image4" text:anchor-type="char" svg:width="17cm" svg:height="4.611cm" draw:z-index="3"><draw:image xlink:href="Pictures/100000010000037C000000F228D3CB00CAE5081C.png" xlink:type="simple" xlink:show="embed" xlink:actuate="onLoad" draw:mime-type="image/png"/></draw:frame></text:p>
      <text:h text:style-name="Heading_20_1" text:outline-level="1">4. Zipping and Unzipping</text:h>
      <text:p text:style-name="Standard">Commands:<text:line-break/>cd ..<text:line-break/>zip -r test_dir.zip test_dir<text:line-break/>unzip test_dir.zip -d unzipped_dir<text:line-break/><text:line-break/>Explanation:<text:line-break/>Compress and extract directory.</text:p>
      <text:p text:style-name="Standard"><draw:frame draw:style-name="fr2" draw:name="Image5" text:anchor-type="char" svg:width="17cm" svg:height="12.871cm" draw:z-index="4"><draw:image xlink:href="Pictures/100000010000038A000002AE212063DDA222BF8E.png" xlink:type="simple" xlink:show="embed" xlink:actuate="onLoad" draw:mime-type="image/png"/></draw:frame><text:soft-page-break/></text:p>
      <text:p text:style-name="Standard"><draw:frame draw:style-name="fr1" draw:name="Image6" text:anchor-type="char" svg:width="17cm" svg:height="4.292cm" draw:z-index="5"><draw:image xlink:href="Pictures/10000001000002B1000000AE6918DD29A047FE8E.png" xlink:type="simple" xlink:show="embed" xlink:actuate="onLoad" draw:mime-type="image/png"/></draw:frame></text:p>
      <text:p text:style-name="Standard"/>
      <text:h text:style-name="Heading_20_1" text:outline-level="1">5. Downloading Files</text:h>
      <text:p text:style-name="Standard">Command:<text:line-break/>wget https://www.w3.org/TR/PNG/iso_8859-1.txt<text:line-break/><text:soft-page-break/><text:line-break/>Explanation:<text:line-break/>Downloads file from internet.</text:p>
      <text:p text:style-name="Standard"/>
      <text:p text:style-name="Standard"><draw:frame draw:style-name="fr1" draw:name="Image7" text:anchor-type="char" svg:width="17cm" svg:height="2.693cm" draw:z-index="6"><draw:image xlink:href="Pictures/10000001000003D80000009C21FE7F1EDC4D3E1B.png" xlink:type="simple" xlink:show="embed" xlink:actuate="onLoad" draw:mime-type="image/png"/></draw:frame></text:p>
      <text:h text:style-name="Heading_20_1" text:outline-level="1">6. Changing Permissions</text:h>
      <text:p text:style-name="Standard">Commands:<text:line-break/>touch secure.txt<text:line-break/>chmod 444 secure.txt<text:line-break/><text:line-break/>Explanation:<text:line-break/>Makes file read-only.</text:p>
      <text:p text:style-name="Standard"/>
      <text:p text:style-name="Standard"><draw:frame draw:style-name="fr1" draw:name="Image8" text:anchor-type="char" svg:width="17cm" svg:height="3.112cm" draw:z-index="7"><draw:image xlink:href="Pictures/10000001000003540000009C9D9B664A520E7AED.png" xlink:type="simple" xlink:show="embed" xlink:actuate="onLoad" draw:mime-type="image/png"/></draw:frame></text:p>
      <text:h text:style-name="Heading_20_1" text:outline-level="1">7. Environment Variables</text:h>
      <text:p text:style-name="Standard">Commands:<text:line-break/>export MY_VAR="Hello, Linux!"<text:line-break/>echo $MY_VAR<text:line-break/><text:line-break/>Explanation:<text:line-break/>Creates and verifies environment variable.</text:p>
      <text:p text:style-name="Standard"/>
      <text:p text:style-name="Standard"><draw:frame draw:style-name="fr1" draw:name="Image9" text:anchor-type="char" svg:width="17cm" svg:height="2.383cm" draw:z-index="8"><draw:image xlink:href="Pictures/10000001000003580000007820E88667F88DFA5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4-08T22:10:03.091019979</dc:date>
    <meta:editing-duration>PT4M30S</meta:editing-duration>
    <meta:generator>LibreOffice/7.3.7.2$Linux_X86_64 LibreOffice_project/30$Build-2</meta:generator>
    <meta:document-statistic meta:table-count="0" meta:image-count="9" meta:object-count="0" meta:page-count="6" meta:paragraph-count="15" meta:word-count="129" meta:character-count="1004" meta:non-whitespace-character-count="883"/>
    <meta:user-defined meta:name="AppVersion">14.0000</meta:user-defined>
    <meta:template xlink:type="simple" xlink:actuate="onRequest" xlink:title="Normal.dotm" xlink:href=""/>
  </office:meta>
</office:document-meta>
</file>